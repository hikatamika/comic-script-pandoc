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ourier Prime" svg:font-family="'Courier Prime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itle" style:master-page-name="First_20_Page">
      <style:paragraph-properties fo:text-align="left" style:justify-single-word="false" style:page-number="auto"/>
      <style:text-properties fo:font-size="16pt" style:text-underline-style="solid" style:text-underline-width="auto" style:text-underline-color="font-color" officeooo:rsid="0055b684" officeooo:paragraph-rsid="0055b684" style:font-size-asian="16pt" style:font-size-complex="16pt"/>
    </style:style>
    <style:style style:name="P2" style:family="paragraph" style:parent-style-name="Comic_20_Credits">
      <style:paragraph-properties style:writing-mode="lr-tb" style:writing-mode-automatic="false"/>
    </style:style>
    <style:style style:name="P3" style:family="paragraph" style:parent-style-name="Comic_20_Credits">
      <style:text-properties fo:font-style="italic" officeooo:rsid="006c148e" officeooo:paragraph-rsid="006c148e" style:font-style-asian="italic" style:font-style-complex="italic"/>
    </style:style>
    <style:style style:name="P4" style:family="paragraph" style:parent-style-name="Page_20_Info">
      <style:paragraph-properties fo:break-before="page"/>
    </style:style>
    <style:style style:name="P5" style:family="paragraph" style:parent-style-name="Panel_20_Info">
      <style:text-properties officeooo:paragraph-rsid="00412b15"/>
    </style:style>
    <style:style style:name="P6" style:family="paragraph" style:parent-style-name="Caption_20_Text">
      <style:text-properties officeooo:rsid="0055c3ec" officeooo:paragraph-rsid="0055c3ec"/>
    </style:style>
    <style:style style:name="P7" style:family="paragraph" style:parent-style-name="Panel_20_Info">
      <style:text-properties officeooo:rsid="0055c3ec" officeooo:paragraph-rsid="0055c3ec"/>
    </style:style>
    <style:style style:name="P8" style:family="paragraph" style:parent-style-name="SFX_20_Source">
      <style:text-properties officeooo:rsid="0055c3ec" officeooo:paragraph-rsid="0055c3ec"/>
    </style:style>
    <style:style style:name="P9" style:family="paragraph" style:parent-style-name="SFX_20_Text">
      <style:text-properties officeooo:rsid="0055c3ec" officeooo:paragraph-rsid="0055c3ec"/>
    </style:style>
    <style:style style:name="P10" style:family="paragraph" style:parent-style-name="Speaker">
      <style:text-properties officeooo:rsid="00578cd6" officeooo:paragraph-rsid="00578cd6"/>
    </style:style>
    <style:style style:name="P11" style:family="paragraph" style:parent-style-name="Dialog">
      <style:text-properties officeooo:rsid="00578cd6" officeooo:paragraph-rsid="00578cd6"/>
    </style:style>
    <style:style style:name="P12" style:family="paragraph" style:parent-style-name="Panel_20_Info">
      <style:text-properties officeooo:rsid="00578cd6" officeooo:paragraph-rsid="00578cd6"/>
    </style:style>
    <style:style style:name="P13" style:family="paragraph" style:parent-style-name="Speaker">
      <style:text-properties officeooo:rsid="0055c3ec" officeooo:paragraph-rsid="0055c3ec"/>
    </style:style>
    <style:style style:name="P14" style:family="paragraph" style:parent-style-name="Dialog">
      <style:text-properties fo:font-style="italic" fo:font-weight="bold" officeooo:rsid="00578cd6" officeooo:paragraph-rsid="00578cd6" style:font-style-asian="italic" style:font-weight-asian="bold" style:font-style-complex="italic" style:font-weight-complex="bold"/>
    </style:style>
    <style:style style:name="P15" style:family="paragraph" style:parent-style-name="Page_20_Info">
      <style:paragraph-properties fo:break-before="page"/>
      <style:text-properties officeooo:paragraph-rsid="0055c3ec"/>
    </style:style>
    <style:style style:name="P16" style:family="paragraph" style:parent-style-name="Panel_20_Info">
      <style:text-properties officeooo:rsid="00594d7b" officeooo:paragraph-rsid="00594d7b"/>
    </style:style>
    <style:style style:name="P17" style:family="paragraph" style:parent-style-name="Speaker">
      <style:text-properties officeooo:rsid="005b1510" officeooo:paragraph-rsid="005b1510"/>
    </style:style>
    <style:style style:name="P18" style:family="paragraph" style:parent-style-name="Dialog">
      <style:text-properties officeooo:rsid="005b1510" officeooo:paragraph-rsid="005b1510"/>
    </style:style>
    <style:style style:name="P19" style:family="paragraph" style:parent-style-name="Panel_20_Info">
      <style:text-properties officeooo:rsid="005cb598" officeooo:paragraph-rsid="005cb598"/>
    </style:style>
    <style:style style:name="P20" style:family="paragraph" style:parent-style-name="Speaker">
      <style:text-properties officeooo:rsid="005cb598" officeooo:paragraph-rsid="005cb598"/>
    </style:style>
    <style:style style:name="P21" style:family="paragraph" style:parent-style-name="Dialog">
      <style:text-properties officeooo:rsid="005cb598" officeooo:paragraph-rsid="005cb598"/>
    </style:style>
    <style:style style:name="P22" style:family="paragraph" style:parent-style-name="Speaker">
      <style:paragraph-properties style:writing-mode="lr-tb" style:writing-mode-automatic="false"/>
      <style:text-properties officeooo:rsid="005cb598" officeooo:paragraph-rsid="005cb598"/>
    </style:style>
    <style:style style:name="P23" style:family="paragraph" style:parent-style-name="Page_20_Info">
      <style:paragraph-properties fo:break-before="page"/>
      <style:text-properties officeooo:rsid="005e335d" officeooo:paragraph-rsid="005e335d"/>
    </style:style>
    <style:style style:name="P24" style:family="paragraph" style:parent-style-name="Dialog">
      <style:paragraph-properties style:writing-mode="lr-tb" style:writing-mode-automatic="false"/>
      <style:text-properties officeooo:rsid="005cb598" officeooo:paragraph-rsid="005cb598"/>
    </style:style>
    <style:style style:name="P25" style:family="paragraph" style:parent-style-name="Panel_20_Info">
      <style:paragraph-properties style:writing-mode="lr-tb" style:writing-mode-automatic="false"/>
      <style:text-properties officeooo:rsid="005cb598" officeooo:paragraph-rsid="005cb598"/>
    </style:style>
    <style:style style:name="P26" style:family="paragraph" style:parent-style-name="Speaker">
      <style:text-properties officeooo:paragraph-rsid="005cb598"/>
    </style:style>
    <style:style style:name="P27" style:family="paragraph" style:parent-style-name="Panel_20_Info">
      <style:paragraph-properties style:writing-mode="lr-tb" style:writing-mode-automatic="false"/>
      <style:text-properties officeooo:rsid="005d2438" officeooo:paragraph-rsid="005d2438"/>
    </style:style>
    <style:style style:name="P28" style:family="paragraph" style:parent-style-name="Speaker">
      <style:text-properties officeooo:rsid="005d2438" officeooo:paragraph-rsid="005d2438"/>
    </style:style>
    <style:style style:name="P29" style:family="paragraph" style:parent-style-name="Dialog">
      <style:text-properties officeooo:rsid="005d2438" officeooo:paragraph-rsid="005d2438"/>
    </style:style>
    <style:style style:name="P30" style:family="paragraph" style:parent-style-name="Panel_20_Info">
      <style:text-properties officeooo:rsid="005d2438" officeooo:paragraph-rsid="005d2438"/>
    </style:style>
    <style:style style:name="P31" style:family="paragraph" style:parent-style-name="Dialog">
      <style:paragraph-properties style:writing-mode="lr-tb" style:writing-mode-automatic="false"/>
      <style:text-properties officeooo:rsid="005d2438" officeooo:paragraph-rsid="005d2438"/>
    </style:style>
    <style:style style:name="P32" style:family="paragraph" style:parent-style-name="Dialog">
      <style:text-properties fo:font-style="italic" fo:font-weight="bold" officeooo:rsid="005d2438" officeooo:paragraph-rsid="005d2438" style:font-style-asian="italic" style:font-weight-asian="bold" style:font-style-complex="italic" style:font-weight-complex="bold"/>
    </style:style>
    <style:style style:name="P33" style:family="paragraph" style:parent-style-name="Speaker">
      <style:text-properties officeooo:rsid="005e335d" officeooo:paragraph-rsid="005e335d"/>
    </style:style>
    <style:style style:name="P34" style:family="paragraph" style:parent-style-name="Panel_20_Info">
      <style:text-properties officeooo:rsid="005e335d" officeooo:paragraph-rsid="005e335d"/>
    </style:style>
    <style:style style:name="P35" style:family="paragraph" style:parent-style-name="Dialog">
      <style:text-properties officeooo:rsid="005e335d" officeooo:paragraph-rsid="005e335d"/>
    </style:style>
    <style:style style:name="P36" style:family="paragraph" style:parent-style-name="Dialog">
      <style:text-properties fo:font-style="normal" fo:font-weight="normal" officeooo:rsid="005e335d" officeooo:paragraph-rsid="0070884e" style:font-style-asian="normal" style:font-weight-asian="normal" style:font-style-complex="normal" style:font-weight-complex="normal"/>
    </style:style>
    <style:style style:name="P37" style:family="paragraph" style:parent-style-name="Dialog">
      <style:text-properties fo:font-style="normal" fo:font-weight="normal" officeooo:rsid="005e335d" officeooo:paragraph-rsid="005fded8" style:font-style-asian="normal" style:font-weight-asian="normal" style:font-style-complex="normal" style:font-weight-complex="normal"/>
    </style:style>
    <style:style style:name="P38" style:family="paragraph" style:parent-style-name="Speaker">
      <style:text-properties officeooo:rsid="005fded8" officeooo:paragraph-rsid="005fded8"/>
    </style:style>
    <style:style style:name="P39" style:family="paragraph" style:parent-style-name="Dialog">
      <style:paragraph-properties style:writing-mode="lr-tb" style:writing-mode-automatic="false"/>
      <style:text-properties officeooo:rsid="005fded8" officeooo:paragraph-rsid="005fded8"/>
    </style:style>
    <style:style style:name="P40" style:family="paragraph" style:parent-style-name="Panel_20_Info">
      <style:text-properties officeooo:rsid="00633e00" officeooo:paragraph-rsid="00633e00"/>
    </style:style>
    <style:style style:name="P41" style:family="paragraph" style:parent-style-name="Speaker">
      <style:text-properties officeooo:rsid="00633e00" officeooo:paragraph-rsid="00633e00"/>
    </style:style>
    <style:style style:name="P42" style:family="paragraph" style:parent-style-name="Dialog">
      <style:text-properties officeooo:rsid="00633e00" officeooo:paragraph-rsid="00633e00"/>
    </style:style>
    <style:style style:name="P43" style:family="paragraph" style:parent-style-name="Dialog">
      <style:text-properties officeooo:rsid="00633e00" officeooo:paragraph-rsid="0069a2ef"/>
    </style:style>
    <style:style style:name="P44" style:family="paragraph" style:parent-style-name="Panel_20_Info">
      <style:text-properties officeooo:rsid="0063aae8" officeooo:paragraph-rsid="0063aae8"/>
    </style:style>
    <style:style style:name="P45" style:family="paragraph" style:parent-style-name="Speaker">
      <style:text-properties officeooo:rsid="0063aae8" officeooo:paragraph-rsid="0063aae8"/>
    </style:style>
    <style:style style:name="P46" style:family="paragraph" style:parent-style-name="Dialog">
      <style:text-properties officeooo:rsid="0063aae8" officeooo:paragraph-rsid="0063aae8"/>
    </style:style>
    <style:style style:name="P47" style:family="paragraph" style:parent-style-name="SFX_20_Source">
      <style:text-properties officeooo:rsid="0063aae8" officeooo:paragraph-rsid="0063aae8"/>
    </style:style>
    <style:style style:name="P48" style:family="paragraph" style:parent-style-name="SFX_20_Text">
      <style:text-properties officeooo:rsid="0063aae8" officeooo:paragraph-rsid="0063aae8"/>
    </style:style>
    <style:style style:name="T1" style:family="text">
      <style:text-properties officeooo:rsid="0055b684"/>
    </style:style>
    <style:style style:name="T2" style:family="text">
      <style:text-properties officeooo:rsid="0072f976"/>
    </style:style>
    <style:style style:name="T3" style:family="text">
      <style:text-properties officeooo:rsid="00578cd6"/>
    </style:style>
    <style:style style:name="T4" style:family="text">
      <style:text-properties officeooo:rsid="0029b758"/>
    </style:style>
    <style:style style:name="T5" style:family="text">
      <style:text-properties officeooo:rsid="0030fb31"/>
    </style:style>
    <style:style style:name="T6" style:family="text">
      <style:text-properties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officeooo:rsid="0064fd6f"/>
    </style:style>
    <style:style style:name="T8" style:family="text">
      <style:text-properties officeooo:rsid="0055c3ec"/>
    </style:style>
    <style:style style:name="T9" style:family="text">
      <style:text-properties officeooo:rsid="005cb598"/>
    </style:style>
    <style:style style:name="T10" style:family="text">
      <style:text-properties officeooo:rsid="00633e00"/>
    </style:style>
    <style:style style:name="T1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2" style:family="text">
      <style:text-properties officeooo:rsid="005d2438"/>
    </style:style>
    <style:style style:name="T13" style:family="text">
      <style:text-properties officeooo:rsid="005b1510"/>
    </style:style>
    <style:style style:name="T14" style:family="text">
      <style:text-properties officeooo:rsid="0066da8e"/>
    </style:style>
    <style:style style:name="T15" style:family="text">
      <style:text-properties officeooo:rsid="0062ce82"/>
    </style:style>
    <style:style style:name="T16" style:family="text">
      <style:text-properties officeooo:rsid="00707a3c"/>
    </style:style>
    <style:style style:name="T17" style:family="text">
      <style:text-properties officeooo:rsid="005e335d"/>
    </style:style>
    <style:style style:name="T18" style:family="text">
      <style:text-properties officeooo:rsid="006e02ee"/>
    </style:style>
    <style:style style:name="T19" style:family="text">
      <style:text-properties fo:font-style="italic" fo:font-weight="bold" officeooo:rsid="005fded8" style:font-style-asian="italic" style:font-weight-asian="bold" style:font-style-complex="italic" style:font-weight-complex="bold"/>
    </style:style>
    <style:style style:name="T20" style:family="text">
      <style:text-properties officeooo:rsid="005fded8"/>
    </style:style>
    <style:style style:name="T21" style:family="text">
      <style:text-properties officeooo:rsid="0069a2ef"/>
    </style:style>
    <style:style style:name="T22" style:family="text">
      <style:text-properties fo:font-style="italic" fo:font-weight="bold" officeooo:rsid="0069a2ef" style:font-style-asian="italic" style:font-weight-asian="bold" style:font-style-complex="italic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lice’s Adventures in Wonderland: A Mad Tea-Party</text:p>
      <text:p text:style-name="Subtitle">ISSUE <text:span text:style-name="T1">VII</text:span></text:p>
      <text:p text:style-name="Comic_20_Credits"><text:span text:style-name="T1">Author</text:span>: Lewis Carroll<text:line-break/><text:span text:style-name="T1">Adaptation</text:span>: <text:span text:style-name="T1">Tam HK★TMK P.</text:span></text:p>
      <text:p text:style-name="P2">Date: <text:span text:style-name="T1">2026-06-11</text:span></text:p>
      <text:p text:style-name="P3">4 Main Characters</text:p>
      <text:h text:style-name="P4" text:outline-level="1">(<text:span text:style-name="T2">R</text:span>) - <text:span text:style-name="T3">4</text:span> Panel<text:span text:style-name="T3">s</text:span></text:h>
      <text:h text:style-name="P5" text:outline-level="2"><text:span text:style-name="T1">Wide, establishing shot of the March Hare’s house</text:span><text:span text:style-name="T4">. </text:span><text:span text:style-name="T1">The chimneys are shaped like rabbit ears, and the roof is thickly thatched with layers of rabbit fur. A large tree frames a garden with a long wooden table, chaotically mismatched teacups and silverware. The Dormouse, asleep, sits between the March Hare and the Mad Hatter along the length of the table.</text:span></text:h>
      <text:h text:style-name="Caption_20_Source" text:outline-level="3"><text:span text:style-name="T5">C</text:span>aption</text:h>
      <text:p text:style-name="P6">A tea-party in full swing…</text:p>
      <text:h text:style-name="P7" text:outline-level="2">Closeup of Dormouse asleep between the other two, who are using it as an arm rest.</text:h>
      <text:h text:style-name="P8" text:outline-level="3">SFX (Dormouse)</text:h>
      <text:p text:style-name="P9">Zzz…</text:p>
      <text:p text:style-name="P9">snrk</text:p>
      <text:h text:style-name="P7" text:outline-level="2"><text:span text:style-name="T3">Medium shot of </text:span>Alice tak<text:span text:style-name="T3">ing</text:span> in the scene, bewildered and intrigued.</text:h>
      <text:h text:style-name="P10" text:outline-level="3">Alice (Thought)</text:h>
      <text:list xml:id="list2636636102" text:style-name="Numbering_20_123">
        <text:list-item>
          <text:p text:style-name="P11">Very uncomfortable for the Dormouse…</text:p>
        </text:list-item>
        <text:list-item>
          <text:p text:style-name="P11">…only, as it’s asleep, I <text:span text:style-name="T6">suppose</text:span> it doesn’t mind…</text:p>
        </text:list-item>
      </text:list>
      <text:h text:style-name="P12" text:outline-level="2">The Mad Hatter and the March Hare quickly turn their gaze to Alice, shouting and waking up the Dormouse. <text:span text:style-name="T7">All four are in view as Alice approaches the table.</text:span></text:h>
      <text:h text:style-name="P13" text:outline-level="3">Mad Hatter &amp; March Hare</text:h>
      <text:list xml:id="list213249376212350" text:continue-numbering="true" text:style-name="Numbering_20_123">
        <text:list-item>
          <text:p text:style-name="P14">No room! No room!!</text:p>
        </text:list-item>
      </text:list>
      <text:h text:style-name="P15" text:outline-level="1"><text:span text:style-name="T8">(</text:span><text:span text:style-name="T2">L</text:span><text:span text:style-name="T8">) – </text:span><text:span text:style-name="T9">5 Panels</text:span></text:h>
      <text:h text:style-name="P12" text:outline-level="2">The camera is behind the Hatter and the Hare, who look at each other in surprise, while Alice huffingly plops down into a large armchair at the end of the table. <text:span text:style-name="T10">The Dormouse is asleep again.</text:span></text:h>
      <text:h text:style-name="P10" text:outline-level="3">Alice</text:h>
      <text:list xml:id="list213249353465683" text:continue-numbering="true" text:style-name="Numbering_20_123">
        <text:list-item text:start-value="1">
          <text:p text:style-name="P11">There’s <text:span text:style-name="T6">plenty</text:span><text:span text:style-name="T11"> of room!!</text:span></text:p>
        </text:list-item>
      </text:list>
      <text:h text:style-name="P16" text:outline-level="2">The March Hare’<text:span text:style-name="T12">s hand</text:span> <text:span text:style-name="T13">gestures</text:span> <text:span text:style-name="T13">to a wineless table</text:span>. <text:span text:style-name="T13">Alice looks at </text:span><text:span text:style-name="T14">his hand</text:span><text:span text:style-name="T13"> with a cocked eyebrow.</text:span></text:h>
      <text:h text:style-name="P17" text:outline-level="3">March Hare <text:span text:style-name="T12">(off)</text:span></text:h>
      <text:list text:continue-numbering="true" text:style-name="Numbering_20_123">
        <text:list-item>
          <text:p text:style-name="P18">Have some wine.</text:p>
        </text:list-item>
      </text:list>
      <text:h text:style-name="P17" text:outline-level="3">Alice</text:h>
      <text:list text:continue-numbering="true" text:style-name="Numbering_20_123">
        <text:list-item>
          <text:p text:style-name="P18">I don’t see any wine…</text:p>
        </text:list-item>
      </text:list>
      <text:h text:style-name="P17" text:outline-level="3">March Hare <text:span text:style-name="T12">(off)</text:span></text:h>
      <text:list xml:id="list213249331524787" text:continue-numbering="true" text:style-name="Numbering_20_123">
        <text:list-item>
          <text:p text:style-name="P18">There isn’t any.</text:p>
        </text:list-item>
      </text:list>
      <text:h text:style-name="P19" text:outline-level="2">Alice angered, crosses her arms. <text:span text:style-name="T14">Medium shot.</text:span></text:h>
      <text:h text:style-name="P20" text:outline-level="3">Alice</text:h>
      <text:list xml:id="list213247491566007" text:continue-numbering="true" text:style-name="Numbering_20_123">
        <text:list-item>
          <text:p text:style-name="P21">Then it wasn’t very <text:span text:style-name="T6">civil</text:span> of you to offer it.</text:p>
        </text:list-item>
      </text:list>
      <text:h text:style-name="P19" text:outline-level="2">The March Hare quizzically looks Alice up and down from behind the rim of his teacup.</text:h>
      <text:h text:style-name="P22" text:outline-level="3">March Hare</text:h>
      <text:list xml:id="list213248110563444" text:continue-numbering="true" text:style-name="Numbering_20_123">
        <text:list-item>
          <text:p text:style-name="P21">It wasn’t very civil of <text:span text:style-name="T6">you</text:span> to sit down without being invited…</text:p>
        </text:list-item>
      </text:list>
      <text:h text:style-name="P19" text:outline-level="2">Alice is gagged. She doesn’t have an immediate comeback. She has to think.</text:h>
      <text:h text:style-name="P20" text:outline-level="3">Alice</text:h>
      <text:list xml:id="list213247650035958" text:continue-numbering="true" text:style-name="Numbering_20_123">
        <text:list-item>
          <text:p text:style-name="P21">…!!</text:p>
        </text:list-item>
      </text:list>
      <text:h text:style-name="P23" text:outline-level="1">(<text:span text:style-name="T2">R</text:span>) – 6 Panels</text:h>
      <text:h text:style-name="P19" text:outline-level="2">Alice stands, propped up by her arms on the table for support, leaning towards the three partyers. The March Hare <text:span text:style-name="T15">is caught </text:span>off-guard, and<text:span text:style-name="T15"> the Dormouse </text:span><text:span text:style-name="T10">is snoring out anime snot bubbles</text:span>.</text:h>
      <text:h text:style-name="P20" text:outline-level="3">Alice (Shout)</text:h>
      <text:list xml:id="list213249124975351" text:continue-numbering="true" text:style-name="Numbering_20_123">
        <text:list-item text:start-value="1">
          <text:p text:style-name="P24">I didn’t know it was <text:span text:style-name="T6">your</text:span> table—</text:p>
        </text:list-item>
        <text:list-item>
          <text:p text:style-name="P24"><text:span text:style-name="T16">…i</text:span>t’s laid for a <text:span text:style-name="T6">great</text:span> many more than <text:span text:style-name="T6">three!!</text:span></text:p>
        </text:list-item>
      </text:list>
      <text:h text:style-name="P25" text:outline-level="2">The Mad Hatter interjects, plainly; studying Alice through squinted eyes and furrowed brows. <text:span text:style-name="T14">Medium shot.</text:span></text:h>
      <text:h text:style-name="P20" text:outline-level="3">Mad Hatter</text:h>
      <text:list xml:id="list213248065482337" text:continue-numbering="true" text:style-name="Numbering_20_123">
        <text:list-item>
          <text:p text:style-name="P21">Your hair wants cutting.</text:p>
        </text:list-item>
      </text:list>
      <text:h text:style-name="P19" text:outline-level="2">Alice is comically dumbfounded. A gag/chibi expression.</text:h>
      <text:h text:style-name="P20" text:outline-level="3">Alice</text:h>
      <text:h text:style-name="P26" text:outline-level="3">…</text:h>
      <text:h text:style-name="Panel_20_Info" text:outline-level="2"><text:span text:style-name="T9">Repeat panel </text:span><text:span text:style-name="T14">and art</text:span><text:span text:style-name="T9">, but with angrier brows and a new hand gesture. Alice raises an accusatory finger to point at the Mad Hatter.</text:span></text:h>
      <text:h text:style-name="P20" text:outline-level="3">Alice</text:h>
      <text:list text:continue-numbering="true" text:style-name="Numbering_20_123">
        <text:list-item>
          <text:p text:style-name="P21">You should learn not to make personal remarks</text:p>
        </text:list-item>
      </text:list>
      <text:h text:style-name="Speaker" text:outline-level="3">Alice <text:span text:style-name="T9">(Aside)</text:span></text:h>
      <text:list xml:id="list213248592065415" text:continue-numbering="true" text:style-name="Numbering_20_123">
        <text:list-item>
          <text:p text:style-name="Dialog"><text:span text:style-name="T9">I</text:span>t’s very rude.</text:p>
        </text:list-item>
      </text:list>
      <text:h text:style-name="P27" text:outline-level="2">The Hatter is suddenly having a lightbulb moment; eyes wide. All eyes around the table are on him.</text:h>
      <text:h text:style-name="P28" text:outline-level="3">Mad Hatter (big)</text:h>
      <text:list xml:id="list213247742954197" text:continue-numbering="true" text:style-name="Numbering_20_123">
        <text:list-item>
          <text:p text:style-name="P29">Why is a raven like a writing-desk?</text:p>
        </text:list-item>
      </text:list>
      <text:h text:style-name="P30" text:outline-level="2">Alice’s face, <text:span text:style-name="T14">mid-expression-</text:span>shift into an excited smile.</text:h>
      <text:h text:style-name="P4" text:outline-level="1">(<text:span text:style-name="T2">L</text:span>) - <text:span text:style-name="T17">4</text:span> Panels</text:h>
      <text:p text:style-name="Heading_20_2"/>
      <text:h text:style-name="P30" text:outline-level="2"><text:span text:style-name="T17">Overhead shot of the table. Alice </text:span>comfortably sits back down, <text:span text:style-name="T14">grinning.</text:span> <text:span text:style-name="T14">W</text:span><text:span text:style-name="T17">hile the Mad Hatter and March Hare </text:span><text:span text:style-name="T14">have engaged body language</text:span><text:span text:style-name="T17">, leaning towards </text:span><text:span text:style-name="T14">Alice</text:span><text:span text:style-name="T17">, the Dormouse, </text:span><text:span text:style-name="T14">slouching,</text:span><text:span text:style-name="T17"> </text:span><text:span text:style-name="T10">blinks half-liddedly</text:span><text:span text:style-name="T17">.</text:span></text:h>
      <text:h text:style-name="P28" text:outline-level="3">Alice (internal monologue)</text:h>
      <text:list text:continue-numbering="true" text:style-name="Numbering_20_123">
        <text:list-item text:start-value="1">
          <text:p text:style-name="P31"><text:span text:style-name="T6">Come,</text:span> we shall have some <text:span text:style-name="T6">fun</text:span> now!! &lt;<text:span text:style-name="T17">3</text:span></text:p>
        </text:list-item>
      </text:list>
      <text:h text:style-name="P28" text:outline-level="3">Alice</text:h>
      <text:list xml:id="list213248227881322" text:continue-numbering="true" text:style-name="Numbering_20_123">
        <text:list-item>
          <text:p text:style-name="P29">I’m glad they’ve begun asking riddles—</text:p>
        </text:list-item>
        <text:list-item>
          <text:p text:style-name="P29">—I believe I can guess that.</text:p>
        </text:list-item>
      </text:list>
      <text:h text:style-name="P30" text:outline-level="2">The March Hare confidently crosses his arms; <text:span text:style-name="T14">the camera beside him.</text:span> Alice is crossing her own back at him, bottom lip raised poutily.</text:h>
      <text:h text:style-name="P28" text:outline-level="3">March hare</text:h>
      <text:list text:continue-numbering="true" text:style-name="Numbering_20_123">
        <text:list-item>
          <text:p text:style-name="P29">Do you mean that you think you can find out the answer to it?</text:p>
        </text:list-item>
      </text:list>
      <text:h text:style-name="P28" text:outline-level="3">Alice</text:h>
      <text:list text:continue-numbering="true" text:style-name="Numbering_20_123">
        <text:list-item>
          <text:p text:style-name="P32">Exactly so!</text:p>
        </text:list-item>
      </text:list>
      <text:h text:style-name="P33" text:outline-level="3">March hare</text:h>
      <text:list xml:id="list213248509386184" text:continue-numbering="true" text:style-name="Numbering_20_123">
        <text:list-item>
          <text:p text:style-name="Dialog">Then you should <text:span text:style-name="T6">say</text:span> what you <text:span text:style-name="T6">mean.</text:span></text:p>
        </text:list-item>
      </text:list>
      <text:h text:style-name="P34" text:outline-level="2">Small panel. Alice’s hand smacks the table.</text:h>
      <text:h text:style-name="P33" text:outline-level="3">Alice (off)</text:h>
      <text:list xml:id="list213248392845677" text:continue-numbering="true" text:style-name="Numbering_20_123">
        <text:list-item>
          <text:p text:style-name="P35">I <text:span text:style-name="T6">do!</text:span></text:p>
        </text:list-item>
      </text:list>
      <text:h text:style-name="P34" text:outline-level="2">Alice is nervous, sinking back into her chair finger on her bottom lip, with unconfident eyebrows.</text:h>
      <text:h text:style-name="P33" text:outline-level="3">Alice</text:h>
      <text:list text:continue-numbering="true" text:style-name="Numbering_20_123">
        <text:list-item>
          <text:p text:style-name="P35">At least—</text:p>
        </text:list-item>
        <text:list-item>
          <text:p text:style-name="P35">—at least I <text:span text:style-name="T6">mean</text:span> what I <text:span text:style-name="T6">say.</text:span></text:p>
        </text:list-item>
      </text:list>
      <text:h text:style-name="P33" text:outline-level="3">Alice (Aside)</text:h>
      <text:list xml:id="list213249091500379" text:continue-numbering="true" text:style-name="Numbering_20_123">
        <text:list-item>
          <text:p text:style-name="P35">That’s the same thing, you know.</text:p>
        </text:list-item>
      </text:list>
      <text:h text:style-name="P23" text:outline-level="1">(<text:span text:style-name="T2">R</text:span>)- <text:span text:style-name="T18">5 Panels </text:span></text:h>
      <text:h text:style-name="P34" text:outline-level="2">The Hatter and the March Hare look at each other intelligently like they’re philosophers from Ancient Greece, while the Dormouse <text:span text:style-name="T10">sleep-</text:span>nods in agreement between them.</text:h>
      <text:h text:style-name="P33" text:outline-level="3">Mad Hatter</text:h>
      <text:list text:continue-numbering="true" text:style-name="Numbering_20_123">
        <text:list-item text:start-value="1">
          <text:p text:style-name="P35">Not the same thing <text:span text:style-name="T6">a bit!</text:span></text:p>
        </text:list-item>
        <text:list-item>
          <text:p text:style-name="P36">You might just as well say that “I <text:span text:style-name="T6">see</text:span> what I <text:span text:style-name="T6">eat</text:span><text:span text:style-name="T19">—</text:span><text:span text:style-name="T6">”</text:span></text:p>
        </text:list-item>
        <text:list-item>
          <text:p text:style-name="P37"><text:span text:style-name="T20">—</text:span>is the same thing as “I <text:span text:style-name="T6">eat</text:span> what I <text:span text:style-name="T6">see</text:span>”!</text:p>
        </text:list-item>
      </text:list>
      <text:h text:style-name="P38" text:outline-level="3">March Hare</text:h>
      <text:list xml:id="list213248077458909" text:continue-numbering="true" text:style-name="Numbering_20_123">
        <text:list-item>
          <text:p text:style-name="P39">You might just as well say that “I <text:span text:style-name="T6">like</text:span> what I <text:span text:style-name="T6">get</text:span>” is the same thing as “I <text:span text:style-name="T6">get</text:span> what I <text:span text:style-name="T6">like</text:span>”!</text:p>
        </text:list-item>
      </text:list>
      <text:h text:style-name="P40" text:outline-level="2">The Dormouse, with both eyes closed, raises both arms in the air, wistfully sleep-talking.</text:h>
      <text:h text:style-name="P41" text:outline-level="3">Dormouse</text:h>
      <text:list xml:id="list213249046834697" text:continue-numbering="true" text:style-name="Numbering_20_123">
        <text:list-item>
          <text:p text:style-name="P42">You… might just as well say…</text:p>
        </text:list-item>
        <text:list-item>
          <text:p text:style-name="P43">…that “I <text:span text:style-name="T6">breathe</text:span> when I <text:span text:style-name="T6">sleep</text:span>”<text:span text:style-name="T21">…</text:span></text:p>
        </text:list-item>
        <text:list-item>
          <text:p text:style-name="P43"><text:span text:style-name="T21">…</text:span>is the same thing as “I <text:span text:style-name="T6">sleep</text:span> when I <text:span text:style-name="T6">breathe</text:span><text:span text:style-name="T22">…</text:span>”!</text:p>
        </text:list-item>
      </text:list>
      <text:h text:style-name="P44" text:outline-level="2">The Hatter, resting his chin in his hand, smiles on the left of the panel. The camera is behind Alice on the right, as she stifles a laugh, pleased to not be the only one getting heat.</text:h>
      <text:h text:style-name="P45" text:outline-level="3">Mad Hatter</text:h>
      <text:list text:continue-numbering="true" text:style-name="Numbering_20_123">
        <text:list-item>
          <text:p text:style-name="P46">It <text:span text:style-name="T6">is</text:span> the same thing with <text:span text:style-name="T6">you</text:span>.</text:p>
        </text:list-item>
      </text:list>
      <text:h text:style-name="P47" text:outline-level="3">SFX (Alice)</text:h>
      <text:p text:style-name="P48">snrk</text:p>
      <text:h text:style-name="P44" text:outline-level="2">Time-transition panel of the sky, decorated with fluffy white clouds and small, distant birds.</text:h>
      <text:h text:style-name="P44" text:outline-level="2">Alice’s fingers drum against the table.</text:h>
      <text:h text:style-name="P47" text:outline-level="3">SFX (Alice’s hand)</text:h>
      <text:p text:style-name="P48">trr-r-r-p</text:p>
      <text:p text:style-name="P48">trr-r-r-p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ourier Prime" svg:font-family="'Courier Prime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Courier Prime" fo:font-family="'Courier Prime'" style:font-style-name="Regular" style:font-family-generic="modern" style:font-pitch="fixed"/>
    </style:style>
    <style:style style:name="Heading" style:family="paragraph" style:parent-style-name="Standard" style:next-style-name="Text_20_body" style:class="chapter">
      <style:paragraph-properties fo:margin-top="0.1665in" fo:margin-bottom="0in" style:contextual-spacing="false" fo:keep-with-next="always"/>
      <style:text-properties style:font-name="Courier Prime" fo:font-family="'Courier Prime'" style:font-style-name="Regular" style:font-family-generic="modern" style:font-pitch="fixed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margin-top="0in" fo:margin-bottom="0in" style:contextual-spacing="false" fo:text-align="left" style:justify-single-word="false"/>
      <style:text-properties fo:text-transform="uppercase" fo:font-size="16pt" style:text-underline-style="solid" style:text-underline-width="auto" style:text-underline-color="font-color" fo:font-weight="bold" style:font-size-asian="16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left" style:justify-single-word="false"/>
      <style:text-properties fo:font-size="12pt" fo:font-weight="bold" style:font-size-asian="12pt" style:font-size-complex="18pt"/>
    </style:style>
    <style:style style:name="Heading_20_1" style:display-name="Heading 1" style:family="paragraph" style:parent-style-name="Heading" style:next-style-name="Text_20_body" style:class="chapter">
      <style:paragraph-properties fo:margin-top="0in" fo:margin-bottom="0.0846in" style:contextual-spacing="false"/>
      <style:text-properties fo:font-size="16pt" style:text-underline-style="solid" style:text-underline-width="auto" style:text-underline-color="font-color" fo:font-weight="bold" style:font-size-asian="16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class="chapter">
      <style:paragraph-properties fo:margin-top="0.1098in" fo:margin-bottom="0in" style:contextual-spacing="false"/>
      <style:text-properties fo:font-size="12pt" fo:font-weight="bold" style:font-size-asian="12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1in" fo:margin-bottom="0in" style:contextual-spacing="false" fo:line-height="115%" fo:text-align="center" style:justify-single-word="false"/>
      <style:text-properties style:font-name="Courier Prime" fo:font-family="'Courier Prime'" style:font-style-name="Regular" style:font-family-generic="modern" style:font-pitch="fixed" fo:font-size="12pt" style:font-size-asian="12pt"/>
    </style:style>
    <style:style style:name="Panel_20_Info" style:display-name="Panel Info" style:family="paragraph" style:parent-style-name="Heading_20_2" style:default-outline-level="2">
      <style:paragraph-properties fo:margin-top="0in" fo:margin-bottom="0.15in" style:contextual-spacing="false" fo:line-height="115%"/>
      <style:text-properties fo:font-style="italic" fo:font-weight="normal" style:font-style-asian="italic" style:font-style-complex="italic"/>
    </style:style>
    <style:style style:name="Speaker" style:family="paragraph" style:parent-style-name="Comic_20_Source" style:next-style-name="Dialog">
      <style:paragraph-properties fo:text-align="center" style:justify-single-word="false"/>
      <style:text-properties fo:text-transform="uppercase"/>
    </style:style>
    <style:style style:name="Caption_20_Text" style:display-name="Caption Text" style:family="paragraph" style:parent-style-name="Comic_20_Content" style:default-outline-level=""/>
    <style:style style:name="SFX_20_Source" style:display-name="SFX Source" style:family="paragraph" style:parent-style-name="Comic_20_Source" style:next-style-name="SFX_20_Text">
      <style:paragraph-properties fo:text-align="center" style:justify-single-word="false"/>
      <style:text-properties fo:font-variant="normal" fo:text-transform="none" fo:font-style="italic" style:font-style-asian="italic"/>
    </style:style>
    <style:style style:name="List_20_Contents" style:display-name="List Contents" style:family="paragraph" style:parent-style-name="Standard" style:class="html">
      <loext:graphic-properties draw:fill="none" draw:fill-color="#729fcf"/>
      <style:paragraph-properties fo:margin-left="0.5in" fo:margin-right="0.5in" fo:text-indent="0in" style:auto-text-indent="false" fo:background-color="transparent"/>
    </style:style>
    <style:style style:name="Dialog" style:family="paragraph" style:parent-style-name="Comic_20_Content" style:default-outline-level="" style:list-style-name="Numbering_20_123" style:master-page-name="">
      <loext:graphic-properties draw:fill="none" draw:fill-color="#729fcf"/>
      <style:paragraph-properties fo:margin-left="0.8098in" style:page-number="auto" fo:background-color="transparent">
        <style:tab-stops/>
      </style:paragraph-properties>
    </style:style>
    <style:style style:name="SFX_20_Text" style:display-name="SFX Text" style:family="paragraph" style:parent-style-name="Comic_20_Content"/>
    <style:style style:name="Page_20_Info" style:display-name="Page Info" style:family="paragraph" style:parent-style-name="Heading_20_1" style:next-style-name="Panel_20_Info" style:default-outline-level="1">
      <style:paragraph-properties text:number-lines="true" text:line-number="1"/>
    </style:style>
    <style:style style:name="Caption_20_Source" style:display-name="Caption Source" style:family="paragraph" style:parent-style-name="Comic_20_Source" style:next-style-name="Caption_20_Text">
      <style:text-properties fo:text-transform="uppercase"/>
    </style:style>
    <style:style style:name="Comic_20_Source" style:display-name="Comic Source" style:family="paragraph" style:parent-style-name="Heading_20_3" style:default-outline-level="3" style:list-style-name="">
      <style:paragraph-properties fo:margin-top="0.1in" fo:margin-bottom="0in" style:contextual-spacing="false" fo:line-height="115%" fo:text-align="center" style:justify-single-word="false"/>
    </style:style>
    <style:style style:name="Comic_20_Content" style:display-name="Comic Content" style:family="paragraph" style:parent-style-name="Standard" style:default-outline-level="" style:list-style-name="">
      <style:paragraph-properties fo:margin-left="0.5in" fo:margin-right="0.5in" fo:margin-top="0in" fo:margin-bottom="0.1in" style:contextual-spacing="false" fo:line-height="115%"/>
    </style:style>
    <style:style style:name="Comic_20_Credits" style:display-name="Comic Credits" style:family="paragraph" style:parent-style-name="Standard">
      <style:paragraph-properties fo:margin-top="0in" fo:margin-bottom="0.1in" style:contextual-spacing="false"/>
    </style:style>
    <style:style style:name="Numbering_20_Symbols" style:display-name="Numbering Symbols" style:family="text"/>
    <style:style style:name="Page_20_Number" style:display-name="Page Number" style:family="text"/>
    <style:style style:name="Auto_20_Comic_20_Page_20_Number" style:display-name="Auto Comic Page Number" style:family="text">
      <style:text-properties style:font-name="Courier Prime" fo:font-family="'Courier Prime'" style:font-style-name="Regular" style:font-family-generic="modern" style:font-pitch="fixed" fo:font-size="16pt" style:text-underline-style="solid" style:text-underline-width="auto" style:text-underline-color="font-color" fo:font-weight="bold" style:font-name-asian="Microsoft YaHei" style:font-family-asian="'Microsoft YaHei'" style:font-family-generic-asian="system" style:font-pitch-asian="variable" style:font-size-asian="16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Auto_20_Panel_20_Number" style:display-name="Auto Panel Number" style:family="text">
      <style:text-properties style:font-name="Courier Prime" fo:font-family="'Courier Prime'" style:font-style-name="Regular" style:font-family-generic="modern" style:font-pitch="fixed" fo:font-size="12pt" fo:font-style="italic" fo:font-weight="bold" style:font-name-asian="Microsoft YaHei" style:font-family-asian="'Microsoft YaHei'" style:font-family-generic-asian="system" style:font-pitch-asian="variable" style:font-size-asian="12pt" style:font-style-asian="italic" style:font-weight-asian="bold" style:font-name-complex="Lucida Sans1" style:font-family-complex="'Lucida Sans'" style:font-family-generic-complex="system" style:font-pitch-complex="variable" style:font-size-complex="16pt" style:font-style-complex="italic" style:font-weight-complex="bold"/>
    </style:style>
    <text:outline-style style:name="Outline">
      <text:outline-level-style text:level="1" text:style-name="Auto_20_Comic_20_Page_20_Number" loext:num-list-format="PAGE %1%" style:num-prefix="PAGE 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text:style-name="Auto_20_Panel_20_Number" loext:num-list-format="Panel %2%:" style:num-prefix="Panel " style:num-suffix=":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fo:text-indent="-0.3098in" fo:margin-left="0.3098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space" fo:text-indent="-0.2756in" fo:margin-left="0.7992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space" fo:text-indent="-0.2756in" fo:margin-left="1.0752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space" fo:text-indent="-0.2756in" fo:margin-left="1.3508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space" fo:text-indent="-0.2756in" fo:margin-left="1.6264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space" fo:text-indent="-0.2756in" fo:margin-left="1.9016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space" fo:text-indent="-0.2756in" fo:margin-left="2.177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space" fo:text-indent="-0.2756in" fo:margin-left="2.4528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space" fo:text-indent="-0.2756in" fo:margin-left="2.7283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space" fo:text-indent="-0.2756in" fo:margin-left="3.0043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5in" fo:margin-bottom="0.75in" fo:margin-left="0.75in" fo:margin-right="0.7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Index" style:page-layout-name="Mpm2" draw:style-name="Mdp1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6-11T18:14:41.557616700</meta:creation-date>
    <meta:editing-duration>PT1H39M9S</meta:editing-duration>
    <meta:editing-cycles>21</meta:editing-cycles>
    <meta:generator>LibreOffice/26.2.4.2$Windows_X86_64 LibreOffice_project/0229ac93fcf0d7cbc6376066c6f35021cef002dc</meta:generator>
    <dc:title>Standard Comic Script Center (2026)</dc:title>
    <meta:initial-creator>Tam "HK★TMK" P.</meta:initial-creator>
    <dc:date>2026-07-05T21:32:47.356351400</dc:date>
    <dc:creator>Tam "HK★TMK" P.</dc:creator>
    <meta:document-statistic meta:table-count="0" meta:image-count="0" meta:object-count="0" meta:page-count="6" meta:paragraph-count="106" meta:word-count="915" meta:character-count="4841" meta:non-whitespace-character-count="4093"/>
    <meta:template xlink:type="simple" xlink:actuate="onRequest" xlink:title="Standard Comic Script Block (2026)" xlink:href="file:///C:/Users/hikad/AppData/Roaming/LibreOffice/4/user/template/Comics/Standard%20Comic%20Script%20Block%20(2026).ott" meta:date="2026-06-11T21:22:01.752150200"/>
  </office:meta>
</office:document-meta>
</file>